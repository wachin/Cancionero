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No_20_Spacing">
      <style:text-properties fo:font-size="9pt" style:font-size-asian="9pt" style:font-size-complex="9pt"/>
    </style:style>
    <style:style style:name="T1" style:family="tex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UERDAS DE AMOR</text:span></text:p>
      <text:p text:style-name="P2">Intro: Dm - Bb - F</text:p>
      <text:p text:style-name="P2"/>
      <text:p text:style-name="P2"><text:s text:c="6"/>Dm <text:s text:c="22"/>Bb <text:s text:c="4"/>F</text:p>
      <text:p text:style-name="P2">Aunque pase el tiempo sé</text:p>
      <text:p text:style-name="P2"><text:s text:c="4"/>Dm <text:s text:c="27"/>Bb <text:s text:c="4"/>F</text:p>
      <text:p text:style-name="P2">Que tu promesa cumplirás</text:p>
      <text:p text:style-name="P2">Dm <text:s text:c="21"/>Bb <text:s text:c="3"/>F</text:p>
      <text:p text:style-name="P2">Nada en ti se perderá</text:p>
      <text:p text:style-name="P2">Dm <text:s text:c="18"/>Bb <text:s text:c="5"/>F</text:p>
      <text:p text:style-name="P2">Esa es mi seguridad</text:p>
      <text:p text:style-name="P2"/>
      <text:p text:style-name="P2"><text:s text:c="5"/>C <text:s text:c="25"/>C7</text:p>
      <text:p text:style-name="P2">Tus cuerdas de amor</text:p>
      <text:p text:style-name="P2"><text:s text:c="30"/>F <text:s text:c="4"/>C Dm</text:p>
      <text:p text:style-name="P2">Cayeron sobre mí</text:p>
      <text:p text:style-name="P2"><text:s text:c="5"/>C <text:s text:c="23"/>C7</text:p>
      <text:p text:style-name="P2">Tus cuerdas de amor</text:p>
      <text:p text:style-name="P2"><text:s text:c="26"/>F <text:s text:c="6"/>C Dm <text:s text:c="4"/>Bb</text:p>
      <text:p text:style-name="P2">Cayeron sobre mí.</text:p>
      <text:p text:style-name="P2"/>
      <text:p text:style-name="P2">CORO:</text:p>
      <text:p text:style-name="P2"><text:s text:c="51"/>F</text:p>
      <text:p text:style-name="P2">//Es tu amor que me sostiene</text:p>
      <text:p text:style-name="P2"><text:s text:c="27"/>Dm <text:s text:c="23"/>Am</text:p>
      <text:p text:style-name="P2">El que me levanta, el que me da paz</text:p>
      <text:p text:style-name="P2"><text:s text:c="24"/>Bb</text:p>
      <text:p text:style-name="P2">Me da seguridad//</text:p>
      <text:p text:style-name="P2"><text:s text:c="23"/>Gm <text:s text:c="32"/>Dm</text:p>
      <text:p text:style-name="P2">De lo que vendrá, Tú tienes el control</text:p>
      <text:p text:style-name="P2"><text:s text:c="41"/>C</text:p>
      <text:p text:style-name="P2">Nunca pierdes el control.</text:p>
      <text:p text:style-name="P2"/>
      <text:p text:style-name="P2"><text:s text:c="2"/>Dm <text:s text:c="24"/>Bb <text:s text:c="5"/>F</text:p>
      <text:p text:style-name="P2">Escucho el eco de tu voz</text:p>
      <text:p text:style-name="P2"><text:s text:c="2"/>Dm <text:s text:c="21"/>Bb <text:s text:c="6"/>F</text:p>
      <text:p text:style-name="P2">Resonando en mi interior</text:p>
      <text:p text:style-name="P2"><text:s text:c="2"/>Dm <text:s text:c="26"/>Bb <text:s text:c="5"/>F</text:p>
      <text:p text:style-name="P2">Tus palabras me sostendrán</text:p>
      <text:p text:style-name="P2"><text:s text:c="2"/>Dm <text:s text:c="14"/>Bb <text:s text:c="3"/>F</text:p>
      <text:p text:style-name="P2">Esa es mi seguridad.</text:p>
      <text:p text:style-name="P2"/>
      <text:p text:style-name="P2"><text:s text:c="2"/>Dm <text:s text:c="32"/>Bb <text:s text:c="4"/>F</text:p>
      <text:p text:style-name="P2">Los velos están cayendo hoy</text:p>
      <text:p text:style-name="P2"><text:s text:c="2"/>Dm <text:s text:c="25"/>Bb <text:s text:c="3"/>F</text:p>
      <text:p text:style-name="P2">Y puedo ver con claridad</text:p>
      <text:p text:style-name="P2"><text:s text:c="2"/>Dm <text:s text:c="28"/>Bb <text:s text:c="11"/>F</text:p>
      <text:p text:style-name="P2">Mi fe se está encendiendo hoy</text:p>
      <text:p text:style-name="P2"><text:s text:c="2"/>Dm <text:s text:c="26"/>Bb <text:s text:c="4"/>F</text:p>
      <text:p text:style-name="P2">Y hoy me vuelvo a levantar. <text:s text:c="7"/></text:p>
      <text:p text:style-name="P2"/>
      <text:p text:style-name="P2">(CORO) <text:s text:c="7"/>PUENTE: Dm - C - Am - B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C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ita Villacreses</meta:initial-creator>
    <meta:editing-cycles>10</meta:editing-cycles>
    <meta:creation-date>2026-06-18T15:30:00</meta:creation-date>
    <dc:date>2026-06-20T23:44:02.104792609</dc:date>
    <meta:editing-duration>PT20M6S</meta:editing-duration>
    <meta:generator>LibreOffice/7.4.7.2$Linux_X86_64 LibreOffice_project/40$Build-2</meta:generator>
    <meta:document-statistic meta:table-count="0" meta:image-count="0" meta:object-count="0" meta:page-count="1" meta:paragraph-count="46" meta:word-count="175" meta:character-count="1424" meta:non-whitespace-character-count="564"/>
    <meta:user-defined meta:name="AppVersion">16.0000</meta:user-defined>
    <meta:template xlink:type="simple" xlink:actuate="onRequest" xlink:title="Normal" xlink:href=""/>
  </office:meta>
</office:document-meta>
</file>